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Normal" style:family="paragraph">
      <style:text-properties style:font-name="Calibri" style:font-name-complex="Calibri"/>
    </style:style>
    <style:style style:name="P3" style:parent-style-name="Normal" style:family="paragraph">
      <style:text-properties style:font-name="Calibri" style:font-name-complex="Calibri"/>
    </style:style>
    <style:style style:name="P4" style:parent-style-name="Normal" style:family="paragraph">
      <style:text-properties style:font-name="Calibri" style:font-name-complex="Calibri"/>
    </style:style>
    <style:style style:name="P5" style:parent-style-name="Normal" style:family="paragraph">
      <style:text-properties style:font-name="Calibri" style:font-name-complex="Calibri"/>
    </style:style>
    <style:style style:name="P6" style:parent-style-name="Normal" style:family="paragraph">
      <style:text-properties style:font-name="Calibri" style:font-name-complex="Calibri"/>
    </style:style>
    <style:style style:name="P7" style:parent-style-name="Normal" style:family="paragraph">
      <style:text-properties style:font-name="Calibri" style:font-name-complex="Calibri"/>
    </style:style>
    <style:style style:name="P8" style:parent-style-name="Normal" style:family="paragraph">
      <style:text-properties style:font-name="Calibri" style:font-name-complex="Calibri"/>
    </style:style>
    <style:style style:name="P9" style:parent-style-name="Normal" style:family="paragraph">
      <style:text-properties style:font-name="Calibri" style:font-name-complex="Calibri"/>
    </style:style>
    <style:style style:name="P10" style:parent-style-name="Normal" style:family="paragraph">
      <style:text-properties style:font-name="Calibri" style:font-name-complex="Calibri"/>
    </style:style>
    <style:style style:name="P11" style:parent-style-name="Normal" style:family="paragraph">
      <style:text-properties style:font-name="Calibri" style:font-name-complex="Calibri"/>
    </style:style>
    <style:style style:name="P12" style:parent-style-name="Normal" style:family="paragraph">
      <style:text-properties style:font-name="Calibri" style:font-name-complex="Calibri"/>
    </style:style>
    <style:style style:name="P13" style:parent-style-name="Normal" style:family="paragraph">
      <style:text-properties style:font-name="Calibri" style:font-name-complex="Calibri"/>
    </style:style>
    <style:style style:name="P14" style:parent-style-name="Normal" style:family="paragraph">
      <style:text-properties style:font-name="Calibri" style:font-name-complex="Calibri"/>
    </style:style>
    <style:style style:name="P15" style:parent-style-name="Normal" style:family="paragraph">
      <style:text-properties style:font-name="Calibri" style:font-name-complex="Calibri"/>
    </style:style>
    <style:style style:name="P16" style:parent-style-name="Normal" style:family="paragraph">
      <style:text-properties style:font-name="Calibri" style:font-name-complex="Calibri"/>
    </style:style>
    <style:style style:name="P17" style:parent-style-name="Normal" style:family="paragraph">
      <style:text-properties style:font-name="Calibri" style:font-name-complex="Calibri"/>
    </style:style>
    <style:style style:name="P18" style:parent-style-name="Normal" style:family="paragraph">
      <style:text-properties style:font-name="Calibri" style:font-name-complex="Calibri"/>
    </style:style>
  </office:automatic-styles>
  <office:body>
    <office:text text:use-soft-page-breaks="true">
      <text:p text:style-name="P1">For this project, I wanted to make sure my Email Simulator felt safe and easy to use for people aged 50–60. I didn't want the technology to get in the way of the learning. Here is why I used HTML, CSS, JavaScript, and Canvas:</text:p>
      <text:p text:style-name="P2">1.<text:s/><text:s/>For Keeping<text:s/>it Simple (HTML)</text:p>
      <text:p text:style-name="P3">I used HTML to build a clear and steady structure.</text:p>
      <text:p text:style-name="P4">Why: For seniors, websites can sometimes feel messy. I used HTML to make sure everything stays in its proper place, making the game feel predictable and easy to follow.</text:p>
      <text:p text:style-name="P5">2. Making it Easy to See (CSS)</text:p>
      <text:p text:style-name="P6">I used CSS to focus entirely on visual comfort.</text:p>
      <text:p text:style-name="P7">I moved away from small text and used extra-large, bold fonts and bright, high-contrast buttons. I also made it so that when you move your mouse over a button, it clearly highlights, so the user knows exactly what they are clicking on.</text:p>
      <text:p text:style-name="P8">3. No-Stress Gameplay (JavaScript)</text:p>
      <text:p text:style-name="P9">JavaScript is what makes the game work, but I programmed it to be patient.</text:p>
      <text:p text:style-name="P10">As<text:s/>Many<text:s/>of the<text:s/><text:s/>games are too fast. I used JavaScript to make sure there is no time pressure. The game waits for the user to finish reading and click "Next" before moving on. It also gives<text:s/>Simple language<text:s/>tips immediately, so the user isn't left guessing.</text:p>
      <text:p text:style-name="P11">4. Making it Feel Real (Canvas)</text:p>
      <text:p text:style-name="P12">I used the Canvas to add a<text:s/>Animation<text:s/>feel.</text:p>
      <text:p text:style-name="P13">Why: Instead of just clicking buttons, the Canvas lets me add features like a Magnifying Glass that the user can drag around. This makes it feel more like a real-life activity, which helps seniors learn by doing rather than just reading.</text:p>
      <text:p text:style-name="P14"/>
      <text:p text:style-name="P15"/>
      <text:p text:style-name="P16">So this<text:s/></text:p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manpreet Singh</meta:initial-creator>
    <dc:creator>Harmanpreet Singh</dc:creator>
    <meta:creation-date>2026-05-14T15:28:00Z</meta:creation-date>
    <dc:date>2026-05-14T15:41:00Z</dc:date>
    <meta:template xlink:href="Normal" xlink:type="simple"/>
    <meta:editing-cycles>3</meta:editing-cycles>
    <meta:editing-duration>PT780S</meta:editing-duration>
    <meta:document-statistic meta:page-count="1" meta:paragraph-count="2" meta:word-count="221" meta:character-count="1484" meta:row-count="10" meta:non-whitespace-character-count="1265"/>
  </office:meta>
</office:document-meta>
</file>